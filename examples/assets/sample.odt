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>
  <office:body>
    <office:text>
      <text:h text:outline-level="1">ODT 文件範例 Heading 1</text:h>
      <text:p>這是一段一般段落 paragraph,測試中英混排與自動換行 wrapping。</text:p>
      <text:h text:outline-level="2">小節 Heading 2</text:h>
      <text:list>
        <text:list-item>
          <text:p>清單項目一</text:p>
        </text:list-item>
        <text:list-item>
          <text:p>清單項目二 list item</text:p>
        </text:list-item>
      </text:list>
      <text:p>最後一段,確認 ODT 解析正常。</text:p>
    </office:text>
  </office:body>
</office:document-content>
</file>